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7cbd" officeooo:paragraph-rsid="00057cbd"/>
    </style:style>
    <style:style style:name="P2" style:family="paragraph" style:parent-style-name="Standard" style:list-style-name="L1">
      <style:text-properties officeooo:rsid="00057cbd" officeooo:paragraph-rsid="00057cbd"/>
    </style:style>
    <style:style style:name="P3" style:family="paragraph" style:parent-style-name="Standard">
      <style:text-properties officeooo:paragraph-rsid="00057cbd"/>
    </style:style>
    <style:style style:name="P4" style:family="paragraph" style:parent-style-name="Standard" style:list-style-name="L1">
      <style:text-properties officeooo:rsid="00072839" officeooo:paragraph-rsid="00072839"/>
    </style:style>
    <style:style style:name="P5" style:family="paragraph" style:parent-style-name="Standard">
      <style:text-properties officeooo:rsid="00072839" officeooo:paragraph-rsid="00072839"/>
    </style:style>
    <style:style style:name="P6" style:family="paragraph" style:parent-style-name="Standard">
      <style:text-properties officeooo:rsid="00072839" officeooo:paragraph-rsid="000fa7cd"/>
    </style:style>
    <style:style style:name="P7" style:family="paragraph" style:parent-style-name="Standard">
      <style:text-properties officeooo:rsid="00085331" officeooo:paragraph-rsid="00085331"/>
    </style:style>
    <style:style style:name="P8" style:family="paragraph" style:parent-style-name="Standard" style:list-style-name="L1">
      <style:text-properties officeooo:rsid="00085331" officeooo:paragraph-rsid="00085331"/>
    </style:style>
    <style:style style:name="P9" style:family="paragraph" style:parent-style-name="Standard" style:list-style-name="L1">
      <style:text-properties officeooo:rsid="000c7da0" officeooo:paragraph-rsid="000c7da0"/>
    </style:style>
    <style:style style:name="P10" style:family="paragraph" style:parent-style-name="Standard">
      <style:text-properties officeooo:rsid="000e1ea1" officeooo:paragraph-rsid="000e1ea1"/>
    </style:style>
    <style:style style:name="P11" style:family="paragraph" style:parent-style-name="Standard">
      <style:text-properties officeooo:rsid="000e1ea1" officeooo:paragraph-rsid="000fa7cd"/>
    </style:style>
    <style:style style:name="T1" style:family="text">
      <style:text-properties officeooo:rsid="00057cbd"/>
    </style:style>
    <style:style style:name="T2" style:family="text">
      <style:text-properties officeooo:rsid="00072839"/>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85331" style:font-style-asian="italic" style:font-style-complex="italic"/>
    </style:style>
    <style:style style:name="T6" style:family="text">
      <style:text-properties fo:font-style="italic" officeooo:rsid="000e1ea1" style:font-style-asian="italic" style:font-style-complex="italic"/>
    </style:style>
    <style:style style:name="T7" style:family="text">
      <style:text-properties fo:font-style="italic" officeooo:rsid="000fa7cd" style:font-style-asian="italic" style:font-style-complex="italic"/>
    </style:style>
    <style:style style:name="T8" style:family="text">
      <style:text-properties officeooo:rsid="00085331"/>
    </style:style>
    <style:style style:name="T9" style:family="text">
      <style:text-properties officeooo:rsid="000a037b"/>
    </style:style>
    <style:style style:name="T10" style:family="text">
      <style:text-properties officeooo:rsid="000b3926"/>
    </style:style>
    <style:style style:name="T11" style:family="text">
      <style:text-properties officeooo:rsid="000c7da0"/>
    </style:style>
    <style:style style:name="T12" style:family="text">
      <style:text-properties officeooo:rsid="000e1ea1"/>
    </style:style>
    <style:style style:name="T13" style:family="text">
      <style:text-properties officeooo:rsid="000fa7cd"/>
    </style:style>
    <style:style style:name="T14" style:family="text">
      <style:text-properties officeooo:rsid="0010025f"/>
    </style:style>
    <style:style style:name="T15" style:family="text">
      <style:text-properties officeooo:rsid="00139f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er Note</text:p>
      <text:p text:style-name="P1"/>
      <text:p text:style-name="P3"><text:span text:style-name="T1">In a project coded by AI Agents, so precious few words are human authored. Here, you will find them, alongside a short history of this bizarre application </text:span><text:span text:style-name="T8">of mine</text:span><text:span text:style-name="T1"> and some musings upon it. We may even touch upon the future.<text:line-break/><text:line-break/></text:span><text:span text:style-name="T12">A History</text:span><text:span text:style-name="T1"><text:line-break/><text:line-break/>Normal started as a </text:span><text:span text:style-name="T8">bare bones</text:span><text:span text:style-name="T1"> personal tool to solve a problem I had been growing steadily and putting off for years: my nasty, tangled media collection. Where to begin on the issues </text:span><text:span text:style-name="T8">with it</text:span><text:span text:style-name="T1">? You know them all, and you know them well. They are the price we pay for sailing the </text:span><text:span text:style-name="T2">high</text:span><text:span text:style-name="T1"> seas of piracy, and sometimes, our own stupidity:<text:line-break/><text:tab/></text:span></text:p>
      <text:list text:style-name="L1">
        <text:list-item>
          <text:p text:style-name="P2">Nasty, Godless naming conventions that defy consistent alphabetization (like.when.the.movie.title.has.this.naming)</text:p>
        </text:list-item>
        <text:list-item>
          <text:p text:style-name="P2">Movies randomly dispersed across multiple steps of the file tree: some hanging out in root (<text:span text:style-name="T4">‘no </text:span><text:span text:style-name="T5">logical </text:span><text:span text:style-name="T4">parent dirs, no chains, no masters’</text:span>), most neatly arranged in <text:span text:style-name="T2">their own</text:span> folder<text:span text:style-name="T2">s</text:span>, <text:span text:style-name="T2">yet</text:span> some randomly <text:span text:style-name="T2">(and invisibly, from the surface) </text:span>nested within <text:span text:style-name="T2">L</text:span>ovecraftian horrors of directory packaging.</text:p>
        </text:list-item>
        <text:list-item>
          <text:p text:style-name="P9">Sample.mkv! Oh, so many of these wretched things. Sometimes they would even pull through in Plex as the actual movie itself. Annoying. </text:p>
        </text:list-item>
        <text:list-item>
          <text:p text:style-name="P9">Featurettes. Some like them. Personally, I don’t care. One thing I noticed when working in normal because of the degree of visibility it gives you is these are commonly encoded in absolute gutter tier quality 720p unless you are download a reference tier rip so even if you did want to watch them they look and sound terrible. I decided they all had to go. Who can afford the extra hard drive space in this economy?</text:p>
        </text:list-item>
        <text:list-item>
          <text:p text:style-name="P2">An approach to “<text:span text:style-name="T3">encoding quality control</text:span>” that amounted to “<text:span text:style-name="T4">eh, at least it has seeds</text:span>” leading to a gradient of ultra compressed, unwatchable trash through to actually legit 2160p UHD encodes living side by side, <text:span text:style-name="T2">as if they deserve to breath the same air (they don’t). </text:span></text:p>
        </text:list-item>
        <text:list-item>
          <text:p text:style-name="P2">Subtitles that obeyed no man and heeded no master: Forced English enabled by default at random <text:span text:style-name="T8">(sometimes good, sometimes shit)</text:span>, English as Default in movies that already had English <text:span text:style-name="T8">Audio as default</text:span>; random foreign languages as default <text:span text:style-name="T8">subtitle </text:span>when the movie was in English already, and so on. </text:p>
        </text:list-item>
        <text:list-item>
          <text:p text:style-name="P2">English movies with Foreign Audio as the primary ‘high bit-rate’ track and a weak, secondary English track. Or a good, well encoded English track <text:span text:style-name="T8">present yet </text:span>inexplicably not the default.</text:p>
        </text:list-item>
        <text:list-item>
          <text:p text:style-name="P2">Literally GB’s worth of “silent passenger audio”: Foreign audio tracks that sit as background options, packaged <text:span text:style-name="T2">invisibly </text:span>within the .mkv containers we all know and love. How many times <text:span text:style-name="T2">am </text:span>I switching to th<text:span text:style-name="T10">at</text:span> 2,500kpbs 7.1 <text:span text:style-name="T10">Atmos </text:span><text:span text:style-name="T11">1.5Gb </text:span>French Audio track hanging out in that copy of “Taken 2”? <text:span text:style-name="T2">Never – but I have been carrying </text:span><text:span text:style-name="T10">it and many like it</text:span><text:span text:style-name="T2"> around in my hard </text:span><text:span text:style-name="T10">d</text:span><text:span text:style-name="T2">rive like a pocket full of </text:span><text:span text:style-name="T11">very heavy </text:span><text:span text:style-name="T2">stones.</text:span></text:p>
        </text:list-item>
        <text:list-item>
          <text:p text:style-name="P2">Literally THOUSANDS of utterly worthless promo, spam, <text:span text:style-name="T11">encoder group token YIFY spam, </text:span>passenger sidecar .txt and other assorted nonsense. </text:p>
        </text:list-item>
        <text:list-item>
          <text:p text:style-name="P4">Minor downstream issues in Plex such as artwork not showing up. A problem that is already comfortably solved by dozens of free tools; naturally, I will vibe code a redundant clone function and throw it into my app like the <text:span text:style-name="T11">imbecile</text:span> I am. Why not, eh? It’s ‘<text:span text:style-name="T4">just for me</text:span>’. Better than downloading a new application or doing it all manually through the Plex interface. </text:p>
        </text:list-item>
        <text:list-item>
          <text:p text:style-name="P8">The pain of juggling multiple GB’s of utterly trash encodes in my Hard drive(s) while they sat around waiting to get slowly replaced as internet/time/torrent availability allowed</text:p>
        </text:list-item>
        <text:list-item>
          <text:p text:style-name="P8">Not having an ability to export a simple, clean list as a spreadsheet so my friends could see my collection. </text:p>
        </text:list-item>
      </text:list>
      <text:p text:style-name="P5"><text:soft-page-break/></text:p>
      <text:p text:style-name="P6">So the problem is clear <text:span text:style-name="T8">to me and my pathway set.</text:span> <text:span text:style-name="T8">W</text:span>ith Codex CLI in one hand, Claude Code CLI <text:span text:style-name="T8">in the other</text:span> I build my little tool. <text:span text:style-name="T8">I even gave it an utterly stupid them</text:span><text:span text:style-name="T9">e selector</text:span><text:span text:style-name="T8"> feature because it delighted me and also as an inside joke with a friend. </text:span>Did I do any rudimentary planning, <text:span text:style-name="T9">UI/UX </text:span>wire framing, consideration of architecture, or development of specifications to guide unifying principles into consistent, pleasing downstream implementation <text:span text:style-name="T9">experiences?</text:span> You use the app and tell me ;)<text:line-break/><text:line-break/>Well, of course I didn’t. <text:span text:style-name="T10">I just made it up as I went, including </text:span><text:span text:style-name="T12">many</text:span><text:span text:style-name="T10"> last minute features crammed in with reckless abandon as they occurred to me. </text:span><text:span text:style-name="T9">The thing </text:span><text:span text:style-name="T10">is amazingly handy, but </text:span><text:span text:style-name="T11">also </text:span><text:span text:style-name="T12">majorly unpolished and </text:span><text:span text:style-name="T9">feels like absolutely shit </text:span><text:span text:style-name="T10">to navigate at times. </text:span><text:span text:style-name="T12">O</text:span><text:span text:style-name="T10">ver a</text:span><text:span text:style-name="T11">l</text:span><text:span text:style-name="T10">l </text:span><text:span text:style-name="T6">normal</text:span><text:span text:style-name="T12"> </text:span><text:span text:style-name="T9">has a tendency to be “really useful in spite of itself”. </text:span>What I did do, <text:span text:style-name="T9">most importantly, </text:span>is solve a very different and annoying problem. <text:span text:style-name="T9">Dealing with and defining this problem</text:span> at times felt like running ass first through a patch of cacti. <text:span text:style-name="T9">It is no easy feat</text:span> to heuristically <text:span text:style-name="T10">map</text:span> and cleanse the absolute <text:span text:style-name="T9">labyrinth of filth that</text:span> accumulates in a modern pirate’s hull. <text:span text:style-name="T9">This is a job that could of course be ‘solved by inference’ – aka – just tell Claude to do it – but where’s the fun in that? Besides, relying on an AI agent to </text:span><text:span text:style-name="T10">catch a lifetime of</text:span><text:span text:style-name="T9"> fish for you in an afternoon is stupid when you can spend </text:span><text:span text:style-name="T11">months</text:span><text:span text:style-name="T9"> of your spare time getting it to build you a fishing rod instead. Welcome to the New Era. You’ll love it here. <text:line-break/><text:line-break/></text:span><text:span text:style-name="T13">A Discovery</text:span></text:p>
      <text:p text:style-name="P6"/>
      <text:p text:style-name="P6"><text:span text:style-name="T10">It </text:span><text:span text:style-name="T13">eventually </text:span><text:span text:style-name="T10">occurred to me that this wonky little tool, and the</text:span> <text:span text:style-name="T9">painfully acquired </text:span>‘<text:span text:style-name="T11">rectal</text:span><text:span text:style-name="T9"> </text:span><text:span text:style-name="T11">needle finding</text:span>’, <text:span text:style-name="T10">actually had </text:span><text:span text:style-name="T12">real </text:span><text:span text:style-name="T10">value to others that spanned</text:span> occurs <text:span text:style-name="T8">across</text:span> <text:span text:style-name="T8">four</text:span> <text:span text:style-name="T10">primary sections</text:span> <text:span text:style-name="T10">of the repo</text:span>:<text:line-break/></text:p>
      <text:p text:style-name="P5">1. Normal – the app itself. A <text:span text:style-name="T9">t</text:span>angled mess of a library can be easily <text:span text:style-name="T9">transformed</text:span> via the <text:span text:style-name="T10">web </text:span>interface with no dependencies other than python3 and a couple of basic libs. <text:span text:style-name="T8">If all you want to do is “make library good” – this is all you need. </text:span><text:span text:style-name="T9">It’s like an Episode of “Queer Eye for the Straight Guy” but for your movie collection and compressed into the length of a YouTube Short. </text:span><text:span text:style-name="T11">It’s the most delightful moment of the entire experience by far. </text:span></text:p>
      <text:p text:style-name="P5"/>
      <text:p text:style-name="P5">2. Python <text:span text:style-name="T8">Scan, Proposal and Apply </text:span>Scripts – the “app” is simply <text:span text:style-name="T8">a Web UI that gives the user a button to call</text:span> <text:span text:style-name="T8">a collection of Python scripts that are doing all the heavy lifting of renaming, profiling, scraping data, re-muxxing audio &amp; subtitles with ffmpeg, etc</text:span>. <text:span text:style-name="T8">They w</text:span><text:span text:style-name="T10">ould</text:span><text:span text:style-name="T8"> probably make a human coder weep to behold and are </text:span><text:span text:style-name="T10">likel</text:span><text:span text:style-name="T8">y beyond the realm of anything besides “machine maintainability” – but damn, </text:span><text:span text:style-name="T10">they are surprisingly functional</text:span><text:span text:style-name="T8">. They can be extracted and used with minimal effort and do very large amounts of very useful work </text:span><text:span text:style-name="T10">in small amounts of time. </text:span></text:p>
      <text:p text:style-name="P5"/>
      <text:p text:style-name="P7">3. Python Test Scripts. These are a gold mine as they test real file names against the Python heuristics to ensure everything passes. The actual value from these is made explicitly and expanded upon even further in the Internal Docs.</text:p>
      <text:p text:style-name="P7"/>
      <text:p text:style-name="P7">4. Internal Docs. <text:span text:style-name="T10">This is the true trove – specifically, a curated list of examples and specifications for anyone who wants to make a tool like this themselves, or even just to modify or otherwise understand the logic of the proposal to application normalization process and the heuristic and parsing challenges it seeks to overcome. </text:span></text:p>
      <text:p text:style-name="P1"/>
      <text:p text:style-name="P10"/>
      <text:p text:style-name="P10"/>
      <text:p text:style-name="P10"/>
      <text:p text:style-name="P10"/>
      <text:p text:style-name="P10"><text:soft-page-break/></text:p>
      <text:p text:style-name="P10"/>
      <text:p text:style-name="P10"/>
      <text:p text:style-name="P10"/>
      <text:p text:style-name="P10"><text:span text:style-name="T13">A</text:span> <text:span text:style-name="T13">Branding Masterc</text:span><text:span text:style-name="T14">la</text:span><text:span text:style-name="T13">ss</text:span></text:p>
      <text:p text:style-name="P10"/>
      <text:p text:style-name="P10"><text:span text:style-name="T13">I decided that </text:span><text:span text:style-name="T7">normal</text:span><text:span text:style-name="T13"> was worth developing further in the direction of usability, uploading to Git, and sharing with the world. </text:span><text:line-break/><text:line-break/><text:span text:style-name="T13">It already had the perfect name</text:span>. <text:span text:style-name="T13">Normal. </text:span>Something to cut through the noise and really differentiate<text:span text:style-name="T15">s</text:span> itself in search queries. <text:span text:style-name="T13">Don Draper himself could not have come up with a better candidate for easy SEO optimization. </text:span><text:line-break/><text:line-break/><text:span text:style-name="T13">Yes, t</text:span>hat should do nicely <text:span text:style-name="T13">indeed</text:span>. <text:span text:style-name="T13">No re-brand needed. </text:span></text:p>
      <text:p text:style-name="P10"/>
      <text:p text:style-name="P10"/>
      <text:p text:style-name="P11"><text:span text:style-name="T13">On</text:span> <text:span text:style-name="T13">Humanity, Nonsense</text:span> <text:s/>&amp; Thoughts Composed and Spoken into the Wind</text:p>
      <text:p text:style-name="P11"/>
      <text:p text:style-name="P10">Traveler, if you’ve come this far you have found a needle in a haystack and then endured thousands of words of its ramblings. You’re a special type, I can tell. I expect wonderful things from you. </text:p>
      <text:p text:style-name="P10"/>
      <text:p text:style-name="P10">Perhaps one day, in our Dead Internet Future, ‘collectors’ of that era will seek out relics like this document. <text:line-break/>‘<text:span text:style-name="T4">A rare article, verified as 100% genuine human authored. It even has the original typos in it. </text:span><text:span text:style-name="T7">It’ll cost you a pretty byte, but documents like these have been getting rarer since the Greater Firewall went up.’</text:span><text:line-break/><text:line-break/>Will they one day form online communities around fandom of this document, basking in its quirky human warmth like a solitary fire burning in the cold wilderness of Listicles and “You’re absolutely right, that’s a key insight!” <text:span text:style-name="T13">reply threa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13:14:25.777881729</meta:creation-date>
    <dc:date>2026-05-14T20:56:09.661909701</dc:date>
    <meta:editing-duration>PT5H55M38S</meta:editing-duration>
    <meta:editing-cycles>2</meta:editing-cycles>
    <meta:generator>LibreOffice/24.2.7.2$Linux_X86_64 LibreOffice_project/420$Build-2</meta:generator>
    <meta:document-statistic meta:table-count="0" meta:image-count="0" meta:object-count="0" meta:page-count="3" meta:paragraph-count="25" meta:word-count="1387" meta:character-count="8061" meta:non-whitespace-character-count="6676"/>
  </office:meta>
</office:document-meta>
</file>